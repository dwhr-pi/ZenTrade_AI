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plexity </text:p>
      <text:p text:style-name="Standard"/>
      <text:p text:style-name="Standard">Erstelle aus den Quellcodes von Github Zenbot eine Desktopgesteuerte Anwendung als Quellcode zur Nutzung auf Linux in einer Zip-Datei zum Downloaden</text:p>
      <text:p text:style-name="Standard"/>
      <text:p text:style-name="Standard">Zenbot ist primär ein command-line-basiertes Tool, aber wir können ein Desktop-Frontend mit Bash/Zenity erstellen, das die Kernfunktionen steuert. Hier eine Implementierung als ZIP-Archiv:</text:p>
      <text:p text:style-name="Standard"/>
      <text:p text:style-name="Standard">**1. Erstelle das Skript `zenbot-gui.sh`:**</text:p>
      <text:p text:style-name="Standard">```bash</text:p>
      <text:p text:style-name="Standard">#!/bin/bash</text:p>
      <text:p text:style-name="Standard">ZENBOT_DIR="$HOME/zenbot"</text:p>
      <text:p text:style-name="Standard">LOG_DIR="$HOME/zenbot_logs"</text:p>
      <text:p text:style-name="Standard"/>
      <text:p text:style-name="Standard">setup_environment() {</text:p>
      <text:p text:style-name="Standard"><text:s text:c="4"/>mkdir -p $LOG_DIR</text:p>
      <text:p text:style-name="Standard"><text:s text:c="4"/>if [ ! -d "$ZENBOT_DIR" ]; then</text:p>
      <text:p text:style-name="Standard"><text:s text:c="8"/>zenity --question --text="Zenbot nicht gefunden. Installieren?" &amp;&amp; install_zenbot</text:p>
      <text:p text:style-name="Standard"><text:s text:c="4"/>fi</text:p>
      <text:p text:style-name="Standard">}</text:p>
      <text:p text:style-name="Standard"/>
      <text:p text:style-name="Standard">install_zenbot() {</text:p>
      <text:p text:style-name="Standard"><text:soft-page-break/><text:s text:c="4"/>(</text:p>
      <text:p text:style-name="Standard"><text:s text:c="8"/>echo "10" ; sudo apt-get update</text:p>
      <text:p text:style-name="Standard"><text:s text:c="8"/>echo "20" ; sudo apt-get install -y nodejs npm mongodb</text:p>
      <text:p text:style-name="Standard"><text:s text:c="8"/>echo "40" ; git clone https://github.com/DeviaVir/zenbot.git $ZENBOT_DIR</text:p>
      <text:p text:style-name="Standard"><text:s text:c="8"/>echo "60" ; cd $ZENBOT_DIR &amp;&amp; npm install</text:p>
      <text:p text:style-name="Standard"><text:s text:c="8"/>echo "80" ; cp $ZENBOT_DIR/conf-sample.js $ZENBOT_DIR/conf.js</text:p>
      <text:p text:style-name="Standard"><text:s text:c="8"/>echo "100" ; sleep 1</text:p>
      <text:p text:style-name="Standard"><text:s text:c="4"/>) | zenity --progress --title="Installation" --auto-close</text:p>
      <text:p text:style-name="Standard">}</text:p>
      <text:p text:style-name="Standard"/>
      <text:p text:style-name="Standard">show_main_menu() {</text:p>
      <text:p text:style-name="Standard"><text:s text:c="4"/>while true; do</text:p>
      <text:p text:style-name="Standard"><text:s text:c="8"/>choice=$(zenity --list \</text:p>
      <text:p text:style-name="Standard"><text:s text:c="12"/>--title="Zenbot Controller" \</text:p>
      <text:p text:style-name="Standard"><text:s text:c="12"/>--text="Hauptmenü" \</text:p>
      <text:p text:style-name="Standard"><text:s text:c="12"/>--column="Option" \</text:p>
      <text:p text:style-name="Standard"><text:s text:c="12"/>"Backtest starten" \</text:p>
      <text:p text:style-name="Standard"><text:s text:c="12"/>"Paper Trading" \</text:p>
      <text:p text:style-name="Standard"><text:s text:c="12"/>"Live Trading" \</text:p>
      <text:p text:style-name="Standard"><text:s text:c="12"/>"Logs anzeigen" \</text:p>
      <text:p text:style-name="Standard"><text:s text:c="12"/>"Beenden")</text:p>
      <text:p text:style-name="Standard"><text:soft-page-break/><text:s text:c="8"/></text:p>
      <text:p text:style-name="Standard"><text:s text:c="8"/>case $choice in</text:p>
      <text:p text:style-name="Standard"><text:s text:c="12"/>"Backtest starten") start_backtest ;;</text:p>
      <text:p text:style-name="Standard"><text:s text:c="12"/>"Paper Trading") start_paper_trading ;;</text:p>
      <text:p text:style-name="Standard"><text:s text:c="12"/>"Live Trading") start_live_trading ;;</text:p>
      <text:p text:style-name="Standard"><text:s text:c="12"/>"Logs anzeigen") show_logs ;;</text:p>
      <text:p text:style-name="Standard"><text:s text:c="12"/>*) exit ;;</text:p>
      <text:p text:style-name="Standard"><text:s text:c="8"/>esac</text:p>
      <text:p text:style-name="Standard"><text:s text:c="4"/>done</text:p>
      <text:p text:style-name="Standard">}</text:p>
      <text:p text:style-name="Standard"/>
      <text:p text:style-name="Standard">start_backtest() {</text:p>
      <text:p text:style-name="Standard"><text:s text:c="4"/>params=$(zenity --forms --title="Backtest Parameter" \</text:p>
      <text:p text:style-name="Standard"><text:s text:c="8"/>--add-entry="Handelszeitraum (z.B. 5m)" \</text:p>
      <text:p text:style-name="Standard"><text:s text:c="8"/>--add-entry="Währungspaar (z.B. BTC-EUR)" \</text:p>
      <text:p text:style-name="Standard"><text:s text:c="8"/>--add-entry="Tage rückwärts")</text:p>
      <text:p text:style-name="Standard"><text:s text:c="4"/></text:p>
      <text:p text:style-name="Standard"><text:s text:c="4"/>IFS='|' read -ra params &lt;&lt;&lt; "$params"</text:p>
      <text:p text:style-name="Standard"><text:s text:c="4"/>nohup $ZENBOT_DIR/zenbot.sh backfill ${params[1]} --days ${params[2]} &amp;&amp; \</text:p>
      <text:p text:style-name="Standard"><text:s text:c="4"/>$ZENBOT_DIR/zenbot.sh sim ${params[1]} --period ${params[0]} --days ${params[2]} &gt; "$LOG_DIR/backtest_$(date +%s).log" &amp;</text:p>
      <text:p text:style-name="Standard">}</text:p>
      <text:p text:style-name="Standard"><text:soft-page-break/></text:p>
      <text:p text:style-name="Standard">start_paper_trading() {</text:p>
      <text:p text:style-name="Standard"><text:s text:c="4"/>$ZENBOT_DIR/zenbot.sh trade --paper | tee "$LOG_DIR/paper_trading_$(date +%s).log" | zenity --text-info --width=800 --height=600 &amp;</text:p>
      <text:p text:style-name="Standard">}</text:p>
      <text:p text:style-name="Standard"/>
      <text:p text:style-name="Standard">start_live_trading() {</text:p>
      <text:p text:style-name="Standard"><text:s text:c="4"/>zenity --warning --text="Stellen Sie sicher, dass API-Keys in conf.js konfiguriert sind!"</text:p>
      <text:p text:style-name="Standard"><text:s text:c="4"/>$ZENBOT_DIR/zenbot.sh trade | tee "$LOG_DIR/live_trading_$(date +%s).log" | zenity --text-info --width=800 --height=600 &amp;</text:p>
      <text:p text:style-name="Standard">}</text:p>
      <text:p text:style-name="Standard"/>
      <text:p text:style-name="Standard">show_logs() {</text:p>
      <text:p text:style-name="Standard"><text:s text:c="4"/>zenity --text-info --filename="$LOG_DIR/$(ls -t $LOG_DIR | head -1)" --width=800 --height=600</text:p>
      <text:p text:style-name="Standard">}</text:p>
      <text:p text:style-name="Standard"/>
      <text:p text:style-name="Standard">setup_environment</text:p>
      <text:p text:style-name="Standard">show_main_menu</text:p>
      <text:p text:style-name="Standard">```</text:p>
      <text:p text:style-name="Standard"/>
      <text:p text:style-name="Standard">**2. Erstelle Installationsanweisungen (`INSTALL-de.txt`):**</text:p>
      <text:p text:style-name="Standard">```text</text:p>
      <text:p text:style-name="Standard">Voraussetzungen:</text:p>
      <text:p text:style-name="Standard"><text:soft-page-break/>- Ubuntu/Debian-basiertes System</text:p>
      <text:p text:style-name="Standard">- Zenity (sudo apt-get install zenity)</text:p>
      <text:p text:style-name="Standard"/>
      <text:p text:style-name="Standard">Installation:</text:p>
      <text:p text:style-name="Standard">1. Zip entpacken: unzip zenbot-gui.zip</text:p>
      <text:p text:style-name="Standard">2. Ausführbar machen: chmod +x zenbot-gui.sh</text:p>
      <text:p text:style-name="Standard">3. Ausführen: ./zenbot-gui.sh</text:p>
      <text:p text:style-name="Standard"/>
      <text:p text:style-name="Standard">Funktionen:</text:p>
      <text:p text:style-name="Standard">- Automatische Zenbot-Installation</text:p>
      <text:p text:style-name="Standard">- Visuelle Backtest-Konfiguration</text:p>
      <text:p text:style-name="Standard">- Echtzeit-Loganzeige</text:p>
      <text:p text:style-name="Standard">- Paper/Live Trading Modus</text:p>
      <text:p text:style-name="Standard">```</text:p>
      <text:p text:style-name="Standard"/>
      <text:p text:style-name="Standard">**3. Erstelle das ZIP-Archiv:**</text:p>
      <text:p text:style-name="Standard">```bash</text:p>
      <text:p text:style-name="Standard">zip zenbot-gui.zip zenbot-gui.sh INSTALL-de.txt</text:p>
      <text:p text:style-name="Standard">```</text:p>
      <text:p text:style-name="Standard"/>
      <text:p text:style-name="Standard">**Download-Link (Beispiel):** <text:s/></text:p>
      <text:p text:style-name="Standard"><text:soft-page-break/>[zenbot-gui.zip](https://example.com/zenbot-gui.zip) (Symbolischer Link)</text:p>
      <text:p text:style-name="Standard"/>
      <text:p text:style-name="Standard">**Funktionsweise:** <text:s/></text:p>
      <text:p text:style-name="Standard">Das Skript verwendet Zenity für die GUI und bietet:</text:p>
      <text:p text:style-name="Standard">- Automatische Dependency-Installation [4][6]</text:p>
      <text:p text:style-name="Standard">- Interaktive Parameterauswahl für Backtests</text:p>
      <text:p text:style-name="Standard">- Live-Logging in separaten Fenstern</text:p>
      <text:p text:style-name="Standard">- Paper/Live Trading Umschaltung</text:p>
      <text:p text:style-name="Standard">- Automatische Log-Verwaltung</text:p>
      <text:p text:style-name="Standard"/>
      <text:p text:style-name="Standard">**Hinweis:** Die eigentliche Zenbot-Installation erfolgt erst bei Erstausführung nach Bestätigung durch den Benutzer [6]. Für Produktionseinsatz sollten zusätzliche Sicherheitschecks implementiert werden.</text:p>
      <text:p text:style-name="Standard"/>
      <text:p text:style-name="Standard">Quellen:</text:p>
      <text:p text:style-name="Standard">[1] Zenbot is a command-line cryptocurrency trading bot using ... - GitHub https://github.com/DeviaVir/zenbot</text:p>
      <text:p text:style-name="Standard">[2] Releases · DeviaVir/zenbot · GitHub https://github.com/DeviaVir/zenbot/releases</text:p>
      <text:p text:style-name="Standard">[3] zenbot/docs/installation/README.md at unstable - GitHub https://github.com/DeviaVir/zenbot/blob/unstable/docs/installation/README.md</text:p>
      <text:p text:style-name="Standard">[4] DaStar81/zenbot - GitHub https://github.com/DaStar81/zenbot</text:p>
      <text:p text:style-name="Standard">[5] Actions · DeviaVir/zenbot - GitHub https://github.com/DeviaVir/zenbot/actions</text:p>
      <text:p text:style-name="Standard">[6] zenbot/docs/README.md at unstable - GitHub https://github.com/DeviaVir/zenbot/blob/unstable/docs/README.md</text:p>
      <text:p text:style-name="Standard">[7] ewollesen/zenbot: A Discord bot that offers a queue system. - GitHub https://github.com/ewollesen/zenbot</text:p>
      <text:p text:style-name="Standard">[8] zenbot/zenbot.bat at unstable · DeviaVir/zenbot - GitHub https://github.com/DeviaVir/zenbot/blob/unstable/zenbot.bat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6" meta:word-count="492" meta:character-count="4502" meta:non-whitespace-character-count="3807"/>
    <meta:generator>LibreOfficeDev/6.0.5.2$Linux_X86_64 LibreOffice_project/</meta:generator>
  </office:meta>
</office:document-meta>
</file>