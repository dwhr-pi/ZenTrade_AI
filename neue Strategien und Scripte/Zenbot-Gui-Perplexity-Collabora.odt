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IBM Plex Sans" svg:font-family="'IBM Plex Sans', Tahoma, 'Lucida Grande', Calibri, 'Helvetica Neue', helvetica, 'DejaVu Sans', arial, sans-serif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Überschrift_20_2">
      <style:text-properties fo:font-variant="normal" fo:text-transform="none" fo:color="#333333" loext:opacity="100%" style:font-name="IBM Plex Sans" fo:letter-spacing="normal" fo:font-style="normal" fo:font-weight="normal"/>
    </style:style>
    <style:style style:name="P2" style:family="paragraph" style:parent-style-name="Fließtext">
      <style:text-properties fo:font-variant="normal" fo:text-transform="none" fo:color="#333333" loext:opacity="100%" style:font-name="IBM Plex Sans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erplexity App</text:h>
      <text:p text:style-name="P2"/>
      <text:p text:style-name="Standard_20__28_user_29_">Erstelle aus den Quellcodes von Github Zenbot eine Desktopgesteuerte Anwendung als Quellcode zur Nutzung auf Linux in einer Zip-Datei zum Downloaden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2. Erstelle Installationsanweisungen (INSTALL-de.txt):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Neu</text:p>
      <text:p text:style-name="Standard_20__28_user_29_"/>
      <text:p text:style-name="Standard_20__28_user_29_"/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IBM Plex Sans" svg:font-family="'IBM Plex Sans', Tahoma, 'Lucida Grande', Calibri, 'Helvetica Neue', helvetica, 'DejaVu Sans', arial, sans-serif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Roboto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Roboto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_20__28_user_29_" style:display-name="Standard (user)" style:family="paragraph" style:class="text"/>
    <style:style style:name="Fließtext" style:family="paragraph" style:parent-style-name="Standard_20__28_user_29_" style:class="text">
      <style:paragraph-properties fo:margin-top="0in" fo:margin-bottom="0.1965in" style:contextual-spacing="false" fo:line-height="115%"/>
    </style:style>
    <style:style style:name="Überschrift" style:family="paragraph" style:parent-style-name="Standard_20__28_user_29_" style:next-style-name="Fließtext" style:class="chapter">
      <style:paragraph-properties fo:margin-top="0.1665in" fo:margin-bottom="0.1965in" style:contextual-spacing="false" fo:keep-with-next="always"/>
      <style:text-properties style:font-name="Carlito1" fo:font-family="Carlit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erif Devanagari" style:font-family-complex="'Noto Serif Devanagari'" style:font-family-generic-complex="system" style:font-pitch-complex="variable" style:font-size-complex="14pt"/>
    </style:style>
    <style:style style:name="Überschrift_20_2" style:display-name="Überschrift 2" style:family="paragraph" style:parent-style-name="Überschrift" style:next-style-name="Fließtext" style:default-outline-level="2" style:list-style-name="" style:class="chapter">
      <style:paragraph-properties fo:margin-top="0.139in" fo:margin-bottom="0.0835in" style:contextual-spacing="false"/>
      <style:text-properties style:font-name="Carlito" fo:font-family="Carlito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erif Devanagari" style:font-family-complex="'Noto Serif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05T13:36:16.145057000</dc:date>
    <meta:editing-duration>PT5M29S</meta:editing-duration>
    <meta:editing-cycles>8</meta:editing-cycles>
    <meta:generator>Collabora_Office/25.04.2.1$Android_AARCH64 LibreOffice_project/4f65d3e2446a</meta:generator>
    <meta:document-statistic meta:table-count="0" meta:image-count="0" meta:object-count="0" meta:page-count="1" meta:paragraph-count="4" meta:word-count="28" meta:character-count="219" meta:non-whitespace-character-count="195"/>
  </office:meta>
</office:document-meta>
</file>