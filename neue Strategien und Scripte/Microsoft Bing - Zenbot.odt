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rlito" svg:font-family="Carlito" style:font-family-generic="roman" style:font-pitch="variable"/>
    <style:font-face style:name="Carlito1" svg:font-family="Carlito" style:font-family-generic="swiss" style:font-pitch="variable"/>
    <style:font-face style:name="Liberation Mono" svg:font-family="'Liberation Mono'" style:font-family-generic="modern" style:font-pitch="fixed"/>
    <style:font-face style:name="Noto Naskh Arabic" svg:font-family="'Noto Naskh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oto Serif Devanagari" svg:font-family="'Noto Serif Devanagari'" style:font-family-generic="system" style:font-pitch="variable"/>
    <style:font-face style:name="OpenSymbol" svg:font-family="OpenSymbol" style:font-charset="x-symbol"/>
    <style:font-face style:name="Roboto" svg:font-family="Roboto"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text:list-style style:name="L1">
      <text:list-level-style-number text:level="1" text:style-name="Nummerierungszeichen" loext:num-list-format="%1%." style:num-suffix="." style:num-format="1">
        <style:list-level-properties text:space-before="0.2961in" text:min-label-width="0.1965in"/>
      </text:list-level-style-number>
      <text:list-level-style-number text:level="2" text:style-name="Nummerierungszeichen" loext:num-list-format="%2%." style:num-suffix="." style:num-format="1">
        <style:list-level-properties text:space-before="0.7882in" text:min-label-width="0.1965in"/>
      </text:list-level-style-number>
      <text:list-level-style-number text:level="3" text:style-name="Nummerierungszeichen" loext:num-list-format="%3%." style:num-suffix="." style:num-format="1">
        <style:list-level-properties text:space-before="1.2807in" text:min-label-width="0.1965in"/>
      </text:list-level-style-number>
      <text:list-level-style-number text:level="4" text:style-name="Nummerierungszeichen" loext:num-list-format="%4%." style:num-suffix="." style:num-format="1">
        <style:list-level-properties text:space-before="1.7728in" text:min-label-width="0.1965in"/>
      </text:list-level-style-number>
      <text:list-level-style-number text:level="5" text:style-name="Nummerierungszeichen" loext:num-list-format="%5%." style:num-suffix="." style:num-format="1">
        <style:list-level-properties text:space-before="2.2654in" text:min-label-width="0.1965in"/>
      </text:list-level-style-number>
      <text:list-level-style-number text:level="6" text:style-name="Nummerierungszeichen" loext:num-list-format="%6%." style:num-suffix="." style:num-format="1">
        <style:list-level-properties text:space-before="2.7579in" text:min-label-width="0.1965in"/>
      </text:list-level-style-number>
      <text:list-level-style-number text:level="7" text:style-name="Nummerierungszeichen" loext:num-list-format="%7%." style:num-suffix="." style:num-format="1">
        <style:list-level-properties text:space-before="3.25in" text:min-label-width="0.1965in"/>
      </text:list-level-style-number>
      <text:list-level-style-number text:level="8" text:style-name="Nummerierungszeichen" loext:num-list-format="%8%." style:num-suffix="." style:num-format="1">
        <style:list-level-properties text:space-before="3.7425in" text:min-label-width="0.1965in"/>
      </text:list-level-style-number>
      <text:list-level-style-number text:level="9" text:style-name="Nummerierungszeichen" loext:num-list-format="%9%." style:num-suffix="." style:num-format="1">
        <style:list-level-properties text:space-before="4.2346in" text:min-label-width="0.1965in"/>
      </text:list-level-style-number>
      <text:list-level-style-number text:level="10" text:style-name="Nummerierungszeichen" loext:num-list-format="%10%." style:num-suffix="." style:num-format="1">
        <style:list-level-properties text:space-before="4.7272in" text:min-label-width="0.1965in"/>
      </text:list-level-style-number>
    </text:list-style>
    <text:list-style style:name="L2">
      <text:list-level-style-bullet text:level="1" text:style-name="Aufzählungszeichen" loext:num-list-format="%1%." style:num-suffix="." text:bullet-char="•">
        <style:list-level-properties text:space-before="0.2961in" text:min-label-width="0.1965in"/>
      </text:list-level-style-bullet>
      <text:list-level-style-bullet text:level="2" text:style-name="Aufzählungszeichen" loext:num-list-format="%2%." style:num-suffix="." text:bullet-char="•">
        <style:list-level-properties text:space-before="0.7882in" text:min-label-width="0.1965in"/>
      </text:list-level-style-bullet>
      <text:list-level-style-bullet text:level="3" text:style-name="Aufzählungszeichen" loext:num-list-format="%3%." style:num-suffix="." text:bullet-char="•">
        <style:list-level-properties text:space-before="1.2807in" text:min-label-width="0.1965in"/>
      </text:list-level-style-bullet>
      <text:list-level-style-bullet text:level="4" text:style-name="Aufzählungszeichen" loext:num-list-format="%4%." style:num-suffix="." text:bullet-char="•">
        <style:list-level-properties text:space-before="1.7728in" text:min-label-width="0.1965in"/>
      </text:list-level-style-bullet>
      <text:list-level-style-bullet text:level="5" text:style-name="Aufzählungszeichen" loext:num-list-format="%5%." style:num-suffix="." text:bullet-char="•">
        <style:list-level-properties text:space-before="2.2654in" text:min-label-width="0.1965in"/>
      </text:list-level-style-bullet>
      <text:list-level-style-bullet text:level="6" text:style-name="Aufzählungszeichen" loext:num-list-format="%6%." style:num-suffix="." text:bullet-char="•">
        <style:list-level-properties text:space-before="2.7579in" text:min-label-width="0.1965in"/>
      </text:list-level-style-bullet>
      <text:list-level-style-bullet text:level="7" text:style-name="Aufzählungszeichen" loext:num-list-format="%7%." style:num-suffix="." text:bullet-char="•">
        <style:list-level-properties text:space-before="3.25in" text:min-label-width="0.1965in"/>
      </text:list-level-style-bullet>
      <text:list-level-style-bullet text:level="8" text:style-name="Aufzählungszeichen" loext:num-list-format="%8%." style:num-suffix="." text:bullet-char="•">
        <style:list-level-properties text:space-before="3.7425in" text:min-label-width="0.1965in"/>
      </text:list-level-style-bullet>
      <text:list-level-style-bullet text:level="9" text:style-name="Aufzählungszeichen" loext:num-list-format="%9%." style:num-suffix="." text:bullet-char="•">
        <style:list-level-properties text:space-before="4.2346in" text:min-label-width="0.1965in"/>
      </text:list-level-style-bullet>
      <text:list-level-style-bullet text:level="10" text:style-name="Aufzählungszeichen"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Fließtext">Es ist wichtig, vorsichtig zu sein, wenn es um den Handel mit Kryptowährungen geht, da dies mit erheblichen Risiken verbunden ist. Ich kann dir jedoch ein grundlegendes Beispiel für einen Algorithmus geben, der mit Zenbot und Binance kompatibel ist. Beachte, dass dies nur ein Ausgangspunkt ist und du den Algorithmus gründlich testen und anpassen solltest, bevor du ihn in einer Live-Umgebung einsetzt.</text:p>
      <text:h text:style-name="Überschrift_20_3" text:outline-level="3">Beispiel: Ein einfacher Trading-Algorithmus für Zenbot</text:h>
      <text:p text:style-name="Vorformatierter_20_Text"><text:span text:style-name="Quelltext">module.exports = function container(get, set, clear) {</text:span></text:p>
      <text:p text:style-name="Vorformatierter_20_Text"><text:span text:style-name="Quelltext"><text:s text:c="2"/>return {</text:span></text:p>
      <text:p text:style-name="Vorformatierter_20_Text"><text:span text:style-name="Quelltext"><text:s text:c="4"/>name: 'simple_strategy',</text:span></text:p>
      <text:p text:style-name="Vorformatierter_20_Text"><text:span text:style-name="Quelltext"><text:s text:c="4"/>description: 'Eine einfache Strategie basierend auf gleitenden Durchschnitten.',</text:span></text:p>
      <text:p text:style-name="Vorformatierter_20_Text"/>
      <text:p text:style-name="Vorformatierter_20_Text"><text:span text:style-name="Quelltext"><text:s text:c="4"/>getOptions: function () {</text:span></text:p>
      <text:p text:style-name="Vorformatierter_20_Text"><text:span text:style-name="Quelltext"><text:s text:c="6"/>this.option('period', 'Analysezeitraum (z.B. 1h, 15m)', String, '1h');</text:span></text:p>
      <text:p text:style-name="Vorformatierter_20_Text"><text:span text:style-name="Quelltext"><text:s text:c="6"/>this.option('short_period', 'Zeitraum für den kurzen gleitenden Durchschnitt', Number, 10);</text:span></text:p>
      <text:p text:style-name="Vorformatierter_20_Text"><text:span text:style-name="Quelltext"><text:s text:c="6"/>this.option('long_period', 'Zeitraum für den langen gleitenden Durchschnitt', Number, 21);</text:span></text:p>
      <text:p text:style-name="Vorformatierter_20_Text"><text:span text:style-name="Quelltext"><text:s text:c="4"/>},</text:span></text:p>
      <text:p text:style-name="Vorformatierter_20_Text"/>
      <text:p text:style-name="Vorformatierter_20_Text"><text:span text:style-name="Quelltext"><text:s text:c="4"/>calculate: function (s) {</text:span></text:p>
      <text:p text:style-name="Vorformatierter_20_Text"><text:span text:style-name="Quelltext"><text:s text:c="6"/>// Berechnung der gleitenden Durchschnitte</text:span></text:p>
      <text:p text:style-name="Vorformatierter_20_Text"><text:span text:style-name="Quelltext"><text:s text:c="6"/>s.short_ma = s.lookback</text:span></text:p>
      <text:p text:style-name="Vorformatierter_20_Text"><text:span text:style-name="Quelltext"><text:s text:c="8"/>.slice(0, s.options.short_period)</text:span></text:p>
      <text:p text:style-name="Vorformatierter_20_Text"><text:span text:style-name="Quelltext"><text:s text:c="8"/>.reduce((sum, tick) =&gt; sum + tick.close, 0) / s.options.short_period;</text:span></text:p>
      <text:p text:style-name="Vorformatierter_20_Text"/>
      <text:p text:style-name="Vorformatierter_20_Text"><text:span text:style-name="Quelltext"><text:s text:c="6"/>s.long_ma = s.lookback</text:span></text:p>
      <text:p text:style-name="Vorformatierter_20_Text"><text:span text:style-name="Quelltext"><text:s text:c="8"/>.slice(0, s.options.long_period)</text:span></text:p>
      <text:p text:style-name="Vorformatierter_20_Text"><text:span text:style-name="Quelltext"><text:s text:c="8"/>.reduce((sum, tick) =&gt; sum + tick.close, 0) / s.options.long_period;</text:span></text:p>
      <text:p text:style-name="Vorformatierter_20_Text"><text:span text:style-name="Quelltext"><text:s text:c="4"/>},</text:span></text:p>
      <text:p text:style-name="Vorformatierter_20_Text"/>
      <text:p text:style-name="Vorformatierter_20_Text"><text:span text:style-name="Quelltext"><text:s text:c="4"/>onPeriod: function (s, cb) {</text:span></text:p>
      <text:p text:style-name="Vorformatierter_20_Text"><text:span text:style-name="Quelltext"><text:s text:c="6"/>if (!s.short_ma || !s.long_ma) return cb();</text:span></text:p>
      <text:p text:style-name="Vorformatierter_20_Text"/>
      <text:p text:style-name="Vorformatierter_20_Text"><text:span text:style-name="Quelltext"><text:s text:c="6"/>// Kauf-/Verkaufslogik</text:span></text:p>
      <text:p text:style-name="Vorformatierter_20_Text"><text:span text:style-name="Quelltext"><text:s text:c="6"/>if (s.short_ma &gt; s.long_ma &amp;&amp; !s.trend) {</text:span></text:p>
      <text:p text:style-name="Vorformatierter_20_Text"><text:span text:style-name="Quelltext"><text:s text:c="8"/>s.signal = 'buy'; // Kaufsignal</text:span></text:p>
      <text:p text:style-name="Vorformatierter_20_Text"><text:span text:style-name="Quelltext"><text:s text:c="8"/>s.trend = 'up';</text:span></text:p>
      <text:p text:style-name="Vorformatierter_20_Text"><text:span text:style-name="Quelltext"><text:s text:c="6"/>} else if (s.short_ma &lt; s.long_ma &amp;&amp; s.trend === 'up') {</text:span></text:p>
      <text:p text:style-name="Vorformatierter_20_Text"><text:span text:style-name="Quelltext"><text:s text:c="8"/>s.signal = 'sell'; // Verkaufssignal</text:span></text:p>
      <text:p text:style-name="Vorformatierter_20_Text"><text:span text:style-name="Quelltext"><text:s text:c="8"/>s.trend = null;</text:span></text:p>
      <text:p text:style-name="Vorformatierter_20_Text"><text:span text:style-name="Quelltext"><text:s text:c="6"/>} else {</text:span></text:p>
      <text:p text:style-name="Vorformatierter_20_Text"><text:span text:style-name="Quelltext"><text:s text:c="8"/>s.signal = null; // Kein Signal</text:span></text:p>
      <text:p text:style-name="Vorformatierter_20_Text"><text:span text:style-name="Quelltext"><text:s text:c="6"/>}</text:span></text:p>
      <text:p text:style-name="Vorformatierter_20_Text"/>
      <text:p text:style-name="Vorformatierter_20_Text"><text:span text:style-name="Quelltext"><text:s text:c="6"/>cb();</text:span></text:p>
      <text:p text:style-name="Vorformatierter_20_Text"><text:span text:style-name="Quelltext"><text:s text:c="4"/>},</text:span></text:p>
      <text:p text:style-name="Vorformatierter_20_Text"/>
      <text:p text:style-name="Vorformatierter_20_Text"><text:span text:style-name="Quelltext"><text:s text:c="4"/>onReport: function (s) {</text:span></text:p>
      <text:p text:style-name="Vorformatierter_20_Text"><text:span text:style-name="Quelltext"><text:s text:c="6"/>const cols = [];</text:span></text:p>
      <text:p text:style-name="Vorformatierter_20_Text"><text:span text:style-name="Quelltext"><text:s text:c="6"/>cols.push('Short MA: ' + s.short_ma.toFixed(2));</text:span></text:p>
      <text:p text:style-name="Vorformatierter_20_Text"><text:span text:style-name="Quelltext"><text:s text:c="6"/>cols.push('Long MA: ' + s.long_ma.toFixed(2));</text:span></text:p>
      <text:p text:style-name="Vorformatierter_20_Text"><text:span text:style-name="Quelltext"><text:s text:c="6"/>return cols;</text:span></text:p>
      <text:p text:style-name="Vorformatierter_20_Text"><text:span text:style-name="Quelltext"><text:s text:c="4"/>},</text:span></text:p>
      <text:p text:style-name="Vorformatierter_20_Text"><text:soft-page-break/><text:span text:style-name="Quelltext"><text:s text:c="2"/>};</text:span></text:p>
      <text:p text:style-name="Vorformatierter_20_Text"><text:span text:style-name="Quelltext">};</text:span></text:p>
      <text:h text:style-name="Überschrift_20_3" text:outline-level="3">Schritte zur Verwendung:</text:h>
      <text:list text:style-name="L1">
        <text:list-item>
          <text:p text:style-name="Fließtext"><text:span text:style-name="Stark_20_betont">Zenbot installieren</text:span>: Stelle sicher, dass Zenbot korrekt installiert ist und mit Binance verbunden ist. </text:p>
        </text:list-item>
        <text:list-item>
          <text:p text:style-name="Fließtext"><text:span text:style-name="Stark_20_betont">Strategie hinzufügen</text:span>: Speichere den obigen Code in einer Datei, z. B. <text:span text:style-name="Quelltext">simple_strategy.js</text:span>, und füge ihn in den Strategien-Ordner von Zenbot ein. </text:p>
        </text:list-item>
        <text:list-item>
          <text:p text:style-name="Fließtext"><text:span text:style-name="Stark_20_betont">Konfiguration anpassen</text:span>: Passe die Parameter wie <text:span text:style-name="Quelltext">short_period</text:span>, <text:span text:style-name="Quelltext">long_period</text:span> und <text:span text:style-name="Quelltext">period</text:span> an deine Bedürfnisse an. </text:p>
        </text:list-item>
        <text:list-item>
          <text:p text:style-name="Fließtext"><text:span text:style-name="Stark_20_betont">Backtesting durchführen</text:span>: Führe Backtests durch, um die Leistung der Strategie zu bewerten. </text:p>
        </text:list-item>
        <text:list-item>
          <text:p text:style-name="Fließtext"><text:span text:style-name="Stark_20_betont">Risiken beachten</text:span>: Setze die Strategie nur mit einem klaren Risikomanagement ein. </text:p>
        </text:list-item>
      </text:list>
      <text:h text:style-name="Überschrift_20_3" text:outline-level="3">Wichtige Hinweise:</text:h>
      <text:list text:style-name="L2">
        <text:list-item>
          <text:p text:style-name="Fließtext"><text:span text:style-name="Stark_20_betont">Kein Garant für Gewinne</text:span>: Dieser Algorithmus ist ein einfaches Beispiel und garantiert keine Gewinne. </text:p>
        </text:list-item>
        <text:list-item>
          <text:p text:style-name="Fließtext"><text:span text:style-name="Stark_20_betont">Eigenverantwortung</text:span>: Du bist für alle Handelsentscheidungen selbst verantwortlich. </text:p>
        </text:list-item>
        <text:list-item>
          <text:p text:style-name="Fließtext"><text:span text:style-name="Stark_20_betont">Weiterentwicklung</text:span>: Optimiere die Strategie durch zusätzliche Indikatoren oder komplexere Logiken. </text:p>
        </text:list-item>
      </text:list>
      <text:p text:style-name="Fließtext">Falls du weitere Unterstützung benötigst, lass es mich wissen!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rlito" svg:font-family="Carlito" style:font-family-generic="roman" style:font-pitch="variable"/>
    <style:font-face style:name="Carlito1" svg:font-family="Carlito" style:font-family-generic="swiss" style:font-pitch="variable"/>
    <style:font-face style:name="Liberation Mono" svg:font-family="'Liberation Mono'" style:font-family-generic="modern" style:font-pitch="fixed"/>
    <style:font-face style:name="Noto Naskh Arabic" svg:font-family="'Noto Naskh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oto Serif Devanagari" svg:font-family="'Noto Serif Devanagari'" style:font-family-generic="system" style:font-pitch="variable"/>
    <style:font-face style:name="OpenSymbol" svg:font-family="OpenSymbol" style:font-charset="x-symbol"/>
    <style:font-face style:name="Roboto"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rlito" fo:font-size="12pt" fo:language="none" fo:country="none" style:font-name-asian="Roboto" style:font-size-asian="12pt" style:language-asian="none" style:country-asian="none" style:font-name-complex="Roboto"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style:use-window-font-color="true" loext:opacity="0%" style:font-name="Carlito" fo:font-size="12pt" fo:language="en" fo:country="US" style:font-name-asian="Roboto" style:font-size-asian="12pt" style:language-asian="zh" style:country-asian="CN" style:font-name-complex="Noto Naskh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ließtext" style:family="paragraph" style:parent-style-name="Standard" style:class="text">
      <style:paragraph-properties fo:margin-top="0in" fo:margin-bottom="0.1965in" style:contextual-spacing="false" fo:line-height="115%"/>
    </style:style>
    <style:style style:name="Überschrift" style:family="paragraph" style:parent-style-name="Standard" style:next-style-name="Fließtext" style:class="text">
      <style:paragraph-properties fo:margin-top="0.1665in" fo:margin-bottom="0.1965in" style:contextual-spacing="false" fo:keep-with-next="always"/>
      <style:text-properties style:font-name="Carlito1" fo:font-family="Carlito" style:font-family-generic="swiss" style:font-pitch="variable" fo:font-size="14pt" style:font-name-asian="Noto Sans CJK SC" style:font-family-asian="'Noto Sans CJK SC'" style:font-family-generic-asian="system" style:font-pitch-asian="variable" style:font-size-asian="14pt" style:font-name-complex="Noto Serif Devanagari" style:font-family-complex="'Noto Serif Devanagari'" style:font-family-generic-complex="system" style:font-pitch-complex="variable" style:font-size-complex="14pt"/>
    </style:style>
    <style:style style:name="Überschrift_20_3" style:display-name="Überschrift 3" style:family="paragraph" style:parent-style-name="Überschrift" style:next-style-name="Fließtext" style:default-outline-level="3" style:list-style-name="" style:class="text">
      <style:paragraph-properties fo:margin-top="0.0972in" fo:margin-bottom="0.0835in" style:contextual-spacing="false"/>
      <style:text-properties style:font-name="Carlito" fo:font-family="Carlito"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erif Devanagari" style:font-family-complex="'Noto Serif Devanagari'" style:font-family-generic-complex="system" style:font-pitch-complex="variable" style:font-size-complex="14pt" style:font-weight-complex="bold"/>
    </style:style>
    <style:style style:name="Vorformatierter_20_Text" style:display-name="Vorformatierter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ell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merierungszeichen" style:family="text"/>
    <style:style style:name="Stark_20_betont" style:display-name="Stark betont" style:family="text">
      <style:text-properties fo:font-weight="bold" style:font-weight-asian="bold" style:font-weight-complex="bold"/>
    </style:style>
    <style:style style:name="Aufzählungszeichen"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19T11:50:16.270278297</dc:date>
    <meta:editing-duration>PT2M23S</meta:editing-duration>
    <meta:editing-cycles>1</meta:editing-cycles>
    <meta:document-statistic meta:table-count="0" meta:image-count="0" meta:object-count="0" meta:page-count="2" meta:paragraph-count="53" meta:word-count="364" meta:character-count="2850" meta:non-whitespace-character-count="2321"/>
    <meta:generator>Collabora_Office/24.04.13.3$Android_AARCH64 LibreOffice_project/0c707661e5c8</meta:generator>
  </office:meta>
</office:document-meta>
</file>